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472in"/>
    </style:style>
    <style:style style:name="Table1.B" style:family="table-column">
      <style:table-column-properties style:column-width="1.0396in"/>
    </style:style>
    <style:style style:name="Table1.C" style:family="table-column">
      <style:table-column-properties style:column-width="1.7063in"/>
    </style:style>
    <style:style style:name="Table1.D" style:family="table-column">
      <style:table-column-properties style:column-width="1.8319in"/>
    </style:style>
    <style:style style:name="Table1.A1" style:family="table-cell">
      <style:table-cell-properties style:vertical-align="middle" fo:padding="0.0194in" fo:border="1.2pt solid #d1d5db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3819in"/>
    </style:style>
    <style:style style:name="Table2.B" style:family="table-column">
      <style:table-column-properties style:column-width="1.041in"/>
    </style:style>
    <style:style style:name="Table2.C" style:family="table-column">
      <style:table-column-properties style:column-width="1.6854in"/>
    </style:style>
    <style:style style:name="Table2.D" style:family="table-column">
      <style:table-column-properties style:column-width="1.8167in"/>
    </style:style>
    <style:style style:name="Table2.A1" style:family="table-cell">
      <style:table-cell-properties style:vertical-align="middle" fo:padding="0.0194in" fo:border="1.2pt solid #d1d5db"/>
    </style:style>
    <style:style style:name="P1" style:family="paragraph" style:parent-style-name="Heading_20_1">
      <style:paragraph-properties fo:padding="0.0193in" fo:border="0.06pt solid #e5e7eb"/>
      <style:text-properties loext:padding="0.0193in" loext:border="0.06pt solid #e5e7eb"/>
    </style:style>
    <style:style style:name="P2" style:family="paragraph" style:parent-style-name="Heading_20_3">
      <style:paragraph-properties fo:padding="0.0193in" fo:border="0.06pt solid #e5e7eb"/>
    </style:style>
    <style:style style:name="P3" style:family="paragraph" style:parent-style-name="Quotations">
      <style:paragraph-properties fo:padding="0.0193in" fo:border="0.06pt solid #e5e7eb"/>
    </style:style>
    <style:style style:name="P4" style:family="paragraph" style:parent-style-name="Table_20_Contents">
      <style:paragraph-properties fo:margin-top="0in" fo:margin-bottom="0.1965in" style:contextual-spacing="false" fo:padding="0.0193in" fo:border="0.06pt solid #e5e7eb"/>
    </style:style>
    <style:style style:name="P5" style:family="paragraph" style:parent-style-name="Table_20_Heading">
      <style:paragraph-properties fo:margin-top="0in" fo:margin-bottom="0.1965in" style:contextual-spacing="false" fo:padding="0.0193in" fo:border="0.06pt solid #e5e7eb"/>
    </style:style>
    <style:style style:name="P6" style:family="paragraph" style:parent-style-name="Text_20_body">
      <style:text-properties loext:padding="0.0193in" loext:border="0.06pt solid #e5e7eb"/>
    </style:style>
    <style:style style:name="P7" style:family="paragraph" style:parent-style-name="Text_20_body" style:list-style-name="L2">
      <style:paragraph-properties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3">
      <style:paragraph-properties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4">
      <style:paragraph-properties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7">
      <style:paragraph-properties fo:padding="0.0193in" fo:border="0.06pt solid #e5e7eb"/>
      <style:text-properties loext:padding="0.0193in" loext:border="0.06pt solid #e5e7eb"/>
    </style:style>
    <style:style style:name="P11" style:family="paragraph" style:parent-style-name="Text_20_body" style:list-style-name="L8">
      <style:paragraph-properties fo:padding="0.0193in" fo:border="0.06pt solid #e5e7eb"/>
      <style:text-properties loext:padding="0.0193in" loext:border="0.06pt solid #e5e7eb"/>
    </style:style>
    <style:style style:name="P12" style:family="paragraph" style:parent-style-name="Text_20_body" style:list-style-name="L9">
      <style:paragraph-properties fo:padding="0.0193in" fo:border="0.06pt solid #e5e7eb"/>
      <style:text-properties loext:padding="0.0193in" loext:border="0.06pt solid #e5e7eb"/>
    </style:style>
    <style:style style:name="P13" style:family="paragraph" style:parent-style-name="Text_20_body" style:list-style-name="L1">
      <style:paragraph-properties fo:padding="0.0193in" fo:border="0.06pt solid #e5e7eb"/>
    </style:style>
    <style:style style:name="P14" style:family="paragraph" style:parent-style-name="Text_20_body">
      <style:paragraph-properties fo:padding="0.0193in" fo:border="0.06pt solid #e5e7eb"/>
    </style:style>
    <style:style style:name="P15" style:family="paragraph" style:parent-style-name="Text_20_body" style:list-style-name="L4">
      <style:paragraph-properties fo:padding="0.0193in" fo:border="0.06pt solid #e5e7eb"/>
    </style:style>
    <style:style style:name="P16" style:family="paragraph" style:parent-style-name="Text_20_body" style:list-style-name="L5">
      <style:paragraph-properties fo:padding="0.0193in" fo:border="0.06pt solid #e5e7eb"/>
    </style:style>
    <style:style style:name="P17" style:family="paragraph" style:parent-style-name="Text_20_body" style:list-style-name="L6">
      <style:paragraph-properties fo:padding="0.0193in" fo:border="0.06pt solid #e5e7eb"/>
    </style:style>
    <style:style style:name="P18" style:family="paragraph" style:parent-style-name="Text_20_body" style:list-style-name="L9">
      <style:paragraph-properties fo:padding="0.0193in" fo:border="0.06pt solid #e5e7eb"/>
    </style:style>
    <style:style style:name="P19" style:family="paragraph" style:parent-style-name="Text_20_body" style:list-style-name="L10">
      <style:paragraph-properties fo:padding="0.0193in" fo:border="0.06pt solid #e5e7eb"/>
    </style:style>
    <style:style style:name="P20" style:family="paragraph" style:parent-style-name="Text_20_body" style:list-style-name="L11">
      <style:paragraph-properties fo:padding="0.0193in" fo:border="0.06pt solid #e5e7eb"/>
    </style:style>
    <style:style style:name="T1" style:family="text">
      <style:text-properties loext:padding="0.0193in" loext:border="0.06pt solid #e5e7eb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fals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CRUITING HIGH SCHOOL GRADUATES TO STUDY AND WORK IN TAIWAN</text:h>
      <text:h text:style-name="P2" text:outline-level="3"><text:span text:style-name="Strong_20_Emphasis"><text:span text:style-name="T1">TIẾNG VIỆT: TUYỂN SINH HỌC SINH TỐT NGHIỆP THPT ĐI DU HỌC VÀ LÀM VIỆC TẠI ĐÀI LOAN</text:span></text:span></text:h>
      <text:p text:style-name="P6"><draw:frame draw:style-name="fr1" draw:name="Object1" text:anchor-type="as-char" svg:width="0.4925in" svg:height="0.4925in" draw:z-index="0"><draw:floating-frame xlink:href="https://www.youtube.com/embed/pi5azcO7gyk?si=cBsvWysebIhIdIi5" xlink:type="simple" xlink:show="embed" xlink:actuate="onLoad"/></draw:frame></text:p>
      <text:p text:style-name="P14"><text:span text:style-name="T1">🎓 </text:span><text:span text:style-name="Strong_20_Emphasis"><text:span text:style-name="T1">HỌC ĐẠI HỌC 4 NĂM KẾT HỢP LÀM VIỆC TẠI ĐÀI LOAN</text:span></text:span><text:span text:style-name="T1"><text:line-break/>✅ </text:span><text:span text:style-name="Strong_20_Emphasis"><text:span text:style-name="T1">KHUYẾN KHÍCH Ở LẠI LÀM VIỆC SAU TỐT NGHIỆP</text:span></text:span><text:span text:style-name="T1"><text:line-break/>📜 </text:span><text:span text:style-name="Strong_20_Emphasis"><text:span text:style-name="T1">Bằng cấp được công nhận quốc tế và tại Việt Nam</text:span></text:span></text:p>
      <text:p text:style-name="Horizontal_20_Line"/>
      <text:h text:style-name="P2" text:outline-level="3"><text:span text:style-name="T1">👥 </text:span><text:span text:style-name="Strong_20_Emphasis"><text:span text:style-name="T1">Đối tượng</text:span></text:span><text:span text:style-name="T1">: Học sinh tốt nghiệp lớp 12</text:span></text:h>
      <text:h text:style-name="P2" text:outline-level="3"><text:span text:style-name="T1">📚 </text:span><text:span text:style-name="Strong_20_Emphasis"><text:span text:style-name="T1">Ngành học</text:span></text:span><text:span text:style-name="T1">:</text:span></text:h>
      <text:p text:style-name="P14"><text:span text:style-name="Strong_20_Emphasis"><text:span text:style-name="T1">1. Học viện Kỹ thuật Bán dẫn</text:span></text:span></text:p>
      <text:list text:style-name="L2">
        <text:list-item>
          <text:p text:style-name="P7">Công nghệ bán dẫn</text:p>
        </text:list-item>
        <text:list-item>
          <text:p text:style-name="P7">Kỹ thuật cơ khí</text:p>
        </text:list-item>
        <text:list-item>
          <text:p text:style-name="P7">Kỹ thuật lạnh, điều hòa và năng lượng</text:p>
        </text:list-item>
      </text:list>
      <text:p text:style-name="P14"><text:span text:style-name="Strong_20_Emphasis"><text:span text:style-name="T1">2. Học viện Quản lý Sức khỏe và Giải trí</text:span></text:span></text:p>
      <text:list text:style-name="L3">
        <text:list-item>
          <text:p text:style-name="P8">Quản lý nhà hàng</text:p>
        </text:list-item>
        <text:list-item>
          <text:p text:style-name="P8">Nấu ăn</text:p>
        </text:list-item>
        <text:list-item>
          <text:p text:style-name="P8">Chăm sóc sức khỏe</text:p>
        </text:list-item>
      </text:list>
      <text:p text:style-name="Horizontal_20_Line"/>
      <text:h text:style-name="P2" text:outline-level="3"><text:span text:style-name="T1">🎁 </text:span><text:span text:style-name="Strong_20_Emphasis"><text:span text:style-name="T1">Quyền lợi sinh viên</text:span></text:span></text:h>
      <text:list text:style-name="L4">
        <text:list-item>
          <text:p text:style-name="P15"><text:span text:style-name="T1">🆓 Miễn </text:span><text:span text:style-name="Strong_20_Emphasis"><text:span text:style-name="T1">học phí học kỳ đầu tiên</text:span></text:span></text:p>
        </text:list-item>
        <text:list-item>
          <text:p text:style-name="P9">Học phí học kỳ 2 bằng với trường công lập Đài Loan</text:p>
        </text:list-item>
        <text:list-item>
          <text:p text:style-name="P15"><text:soft-page-break/><text:span text:style-name="T1">🏠 Miễn </text:span><text:span text:style-name="Strong_20_Emphasis"><text:span text:style-name="T1">phí ký túc xá học kỳ 1 &amp; 2</text:span></text:span></text:p>
        </text:list-item>
        <text:list-item>
          <text:p text:style-name="P15"><text:span text:style-name="T1">🎓 Học bổng lên đến </text:span><text:span text:style-name="Strong_20_Emphasis"><text:span text:style-name="T1">20,000 TWD/học kỳ</text:span></text:span><text:span text:style-name="T1"><text:line-break/>≈ </text:span><text:span text:style-name="Strong_20_Emphasis"><text:span text:style-name="T1">615 USD / 15,400,000 VND</text:span></text:span></text:p>
        </text:list-item>
      </text:list>
      <text:p text:style-name="Horizontal_20_Line"/>
      <text:h text:style-name="P2" text:outline-level="3"><text:span text:style-name="T1">💰 </text:span><text:span text:style-name="Strong_20_Emphasis"><text:span text:style-name="T1">Chi phí ƯỚC TÍNH mỗi học kỳ</text:span></text:span><text:span text:style-name="T1">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Hạng mục</text:p>
          </table:table-cell>
          <table:table-cell table:style-name="Table1.A1" office:value-type="string">
            <text:p text:style-name="P5">TWD</text:p>
          </table:table-cell>
          <table:table-cell table:style-name="Table1.A1" office:value-type="string">
            <text:p text:style-name="P5">USD (≈ 1 USD = 32.5 TWD)</text:p>
          </table:table-cell>
          <table:table-cell table:style-name="Table1.A1" office:value-type="string">
            <text:p text:style-name="P5">VND (≈ 1 TWD = 770 VND)</text:p>
          </table:table-cell>
        </table:table-row>
        <table:table-row>
          <table:table-cell table:style-name="Table1.A1" office:value-type="string">
            <text:p text:style-name="P4">📘 Học viện Kỹ thuật Bán dẫn</text:p>
          </table:table-cell>
          <table:table-cell table:style-name="Table1.A1" office:value-type="string">
            <text:p text:style-name="P4">53,200 TWD</text:p>
          </table:table-cell>
          <table:table-cell table:style-name="Table1.A1" office:value-type="string">
            <text:p text:style-name="P4">≈ 1,638 USD</text:p>
          </table:table-cell>
          <table:table-cell table:style-name="Table1.A1" office:value-type="string">
            <text:p text:style-name="P4">≈ 40,000,000 VND</text:p>
          </table:table-cell>
        </table:table-row>
        <table:table-row>
          <table:table-cell table:style-name="Table1.A1" office:value-type="string">
            <text:p text:style-name="P4">📘 Học viện Quản lý Sức khỏe &amp; Giải trí</text:p>
          </table:table-cell>
          <table:table-cell table:style-name="Table1.A1" office:value-type="string">
            <text:p text:style-name="P4">46,570 TWD</text:p>
          </table:table-cell>
          <table:table-cell table:style-name="Table1.A1" office:value-type="string">
            <text:p text:style-name="P4">≈ 1,433 USD</text:p>
          </table:table-cell>
          <table:table-cell table:style-name="Table1.A1" office:value-type="string">
            <text:p text:style-name="P4">≈ 35,800,000 VND</text:p>
          </table:table-cell>
        </table:table-row>
        <table:table-row>
          <table:table-cell table:style-name="Table1.A1" office:value-type="string">
            <text:p text:style-name="P4">🏠 Ký túc xá (từ kỳ 3)</text:p>
          </table:table-cell>
          <table:table-cell table:style-name="Table1.A1" office:value-type="string">
            <text:p text:style-name="P4">13,500 TWD</text:p>
          </table:table-cell>
          <table:table-cell table:style-name="Table1.A1" office:value-type="string">
            <text:p text:style-name="P4">≈ 415 USD</text:p>
          </table:table-cell>
          <table:table-cell table:style-name="Table1.A1" office:value-type="string">
            <text:p text:style-name="P4">≈ 10,400,000 VND</text:p>
          </table:table-cell>
        </table:table-row>
        <table:table-row>
          <table:table-cell table:style-name="Table1.A1" office:value-type="string">
            <text:p text:style-name="P4">🏥 Bảo hiểm y tế (6 tháng đầu)</text:p>
          </table:table-cell>
          <table:table-cell table:style-name="Table1.A1" office:value-type="string">
            <text:p text:style-name="P4">500 TWD/tháng</text:p>
          </table:table-cell>
          <table:table-cell table:style-name="Table1.A1" office:value-type="string">
            <text:p text:style-name="P4">≈ 15 USD</text:p>
          </table:table-cell>
          <table:table-cell table:style-name="Table1.A1" office:value-type="string">
            <text:p text:style-name="P4">≈ 385,000 VND</text:p>
          </table:table-cell>
        </table:table-row>
        <table:table-row>
          <table:table-cell table:style-name="Table1.A1" office:value-type="string">
            <text:p text:style-name="P4">🏥 Bảo hiểm y tế (từ tháng thứ 7)</text:p>
          </table:table-cell>
          <table:table-cell table:style-name="Table1.A1" office:value-type="string">
            <text:p text:style-name="P4">826 TWD/tháng</text:p>
          </table:table-cell>
          <table:table-cell table:style-name="Table1.A1" office:value-type="string">
            <text:p text:style-name="P4">≈ 25 USD</text:p>
          </table:table-cell>
          <table:table-cell table:style-name="Table1.A1" office:value-type="string">
            <text:p text:style-name="P4">≈ 636,000 VND</text:p>
          </table:table-cell>
        </table:table-row>
        <table:table-row>
          <table:table-cell table:style-name="Table1.A1" office:value-type="string">
            <text:p text:style-name="P4">🪪 Thẻ cư trú (ARC)</text:p>
          </table:table-cell>
          <table:table-cell table:style-name="Table1.A1" office:value-type="string">
            <text:p text:style-name="P4">1,000 TWD/năm</text:p>
          </table:table-cell>
          <table:table-cell table:style-name="Table1.A1" office:value-type="string">
            <text:p text:style-name="P4">≈ 31 USD</text:p>
          </table:table-cell>
          <table:table-cell table:style-name="Table1.A1" office:value-type="string">
            <text:p text:style-name="P4">≈ 770,000 VND</text:p>
          </table:table-cell>
        </table:table-row>
      </table:table>
      <text:p text:style-name="P3"><text:span text:style-name="Strong_20_Emphasis"><text:span text:style-name="T1">Lưu ý</text:span></text:span><text:span text:style-name="T1">: Học kỳ 1 </text:span><text:span text:style-name="Strong_20_Emphasis"><text:span text:style-name="T1">hoàn toàn miễn phí</text:span></text:span><text:span text:style-name="T1"> học phí + ký túc xá</text:span></text:p>
      <text:p text:style-name="Horizontal_20_Line"/>
      <text:h text:style-name="P2" text:outline-level="3"><text:span text:style-name="T1">⏰ </text:span><text:span text:style-name="Strong_20_Emphasis"><text:span text:style-name="T1">Làm việc và thực tập</text:span></text:span></text:h>
      <text:list text:style-name="L5">
        <text:list-item>
          <text:p text:style-name="P16"><text:span text:style-name="T1">Năm 1: làm thêm bán thời gian, </text:span><text:span text:style-name="Strong_20_Emphasis"><text:span text:style-name="T1">20 giờ/tuần</text:span></text:span></text:p>
        </text:list-item>
        <text:list-item>
          <text:p text:style-name="P16"><text:span text:style-name="T1">Năm 2–4: làm thêm + thực tập, </text:span><text:span text:style-name="Strong_20_Emphasis"><text:span text:style-name="T1">40 giờ/tuần</text:span></text:span></text:p>
        </text:list-item>
      </text:list>
      <text:p text:style-name="Horizontal_20_Line"/>
      <text:h text:style-name="P2" text:outline-level="3"><text:span text:style-name="T1">✅ </text:span><text:span text:style-name="Strong_20_Emphasis"><text:span text:style-name="T1">Yêu cầu</text:span></text:span><text:span text:style-name="T1">:</text:span></text:h>
      <text:list text:style-name="L6">
        <text:list-item>
          <text:p text:style-name="P17"><text:span text:style-name="T1">Ưu tiên có </text:span><text:span text:style-name="Strong_20_Emphasis"><text:span text:style-name="T1">chứng chỉ TOCFL A1 tiếng Trung</text:span></text:span></text:p>
        </text:list-item>
        <text:list-item>
          <text:p text:style-name="P17"><text:soft-page-break/><text:span text:style-name="T1">Tốt nghiệp THPT hoặc trung cấp nghề, </text:span><text:span text:style-name="Strong_20_Emphasis"><text:span text:style-name="T1">được công nhận bởi Bộ Giáo dục Đài Loan</text:span></text:span></text:p>
        </text:list-item>
      </text:list>
      <text:h text:style-name="P2" text:outline-level="3"><text:span text:style-name="T1">🇺🇸 </text:span><text:span text:style-name="Strong_20_Emphasis"><text:span text:style-name="T1">RECRUITING HIGH SCHOOL GRADUATES TO STUDY AND WORK IN TAIWAN</text:span></text:span></text:h>
      <text:p text:style-name="P14"><text:span text:style-name="T1">🎓 </text:span><text:span text:style-name="Strong_20_Emphasis"><text:span text:style-name="T1">4-YEAR UNIVERSITY PROGRAM WHILE WORKING IN TAIWAN</text:span></text:span></text:p>
      <text:p text:style-name="P14"><text:span text:style-name="T1">✅ </text:span><text:span text:style-name="Strong_20_Emphasis"><text:span text:style-name="T1">ENCOURAGED TO STAY AND WORK AFTER GRADUATION</text:span></text:span></text:p>
      <text:p text:style-name="P14"><text:span text:style-name="T1">📜 </text:span><text:span text:style-name="Strong_20_Emphasis"><text:span text:style-name="T1">Degrees recognized internationally and in Vietnam</text:span></text:span></text:p>
      <text:p text:style-name="Horizontal_20_Line"/>
      <text:h text:style-name="P2" text:outline-level="3"><text:span text:style-name="T1">👥 </text:span><text:span text:style-name="Strong_20_Emphasis"><text:span text:style-name="T1">Target Applicants</text:span></text:span><text:span text:style-name="T1">: High school graduates (Grade 12)</text:span></text:h>
      <text:h text:style-name="P2" text:outline-level="3"><text:span text:style-name="T1">📚 </text:span><text:span text:style-name="Strong_20_Emphasis"><text:span text:style-name="T1">Available Majors</text:span></text:span><text:span text:style-name="T1">:</text:span></text:h>
      <text:p text:style-name="P14"><text:span text:style-name="Strong_20_Emphasis"><text:span text:style-name="T1">1. Semiconductor Technical Academy</text:span></text:span></text:p>
      <text:list text:style-name="L7">
        <text:list-item>
          <text:p text:style-name="P10">Semiconductor Technology</text:p>
        </text:list-item>
        <text:list-item>
          <text:p text:style-name="P10">Mechanical Engineering</text:p>
        </text:list-item>
        <text:list-item>
          <text:p text:style-name="P10">Refrigeration, Air Conditioning &amp; Energy Technology</text:p>
        </text:list-item>
      </text:list>
      <text:p text:style-name="P14"><text:span text:style-name="Strong_20_Emphasis"><text:span text:style-name="T1">2. Health and Recreation Management Academy</text:span></text:span></text:p>
      <text:list text:style-name="L8">
        <text:list-item>
          <text:p text:style-name="P11">Restaurant Management</text:p>
        </text:list-item>
        <text:list-item>
          <text:p text:style-name="P11">Culinary Arts</text:p>
        </text:list-item>
        <text:list-item>
          <text:p text:style-name="P11">Health Care</text:p>
        </text:list-item>
      </text:list>
      <text:p text:style-name="Horizontal_20_Line"/>
      <text:h text:style-name="P2" text:outline-level="3"><text:span text:style-name="T1">🎁 </text:span><text:span text:style-name="Strong_20_Emphasis"><text:span text:style-name="T1">Student Benefits</text:span></text:span><text:span text:style-name="T1">:</text:span></text:h>
      <text:list text:style-name="L9">
        <text:list-item>
          <text:p text:style-name="P18"><text:span text:style-name="T1">🆓 Tuition is </text:span><text:span text:style-name="Strong_20_Emphasis"><text:span text:style-name="T1">free for the 1st semester</text:span></text:span></text:p>
        </text:list-item>
        <text:list-item>
          <text:p text:style-name="P12">Tuition for semester 2 is same as Taiwan’s public schools</text:p>
        </text:list-item>
        <text:list-item>
          <text:p text:style-name="P18"><text:span text:style-name="T1">🏠 Free </text:span><text:span text:style-name="Strong_20_Emphasis"><text:span text:style-name="T1">dormitory for semester 1 &amp; 2</text:span></text:span></text:p>
        </text:list-item>
        <text:list-item>
          <text:p text:style-name="P18"><text:span text:style-name="T1">🎓 Attractive scholarships up to </text:span><text:span text:style-name="Strong_20_Emphasis"><text:span text:style-name="T1">20,000 TWD/semester</text:span></text:span></text:p>
        </text:list-item>
        <text:list-item>
          <text:p text:style-name="P18"><text:span text:style-name="T1">≈ </text:span><text:span text:style-name="Strong_20_Emphasis"><text:span text:style-name="T1">615 USD / 15,400,000 VND</text:span></text:span></text:p>
        </text:list-item>
      </text:list>
      <text:p text:style-name="Horizontal_20_Line"/>
      <text:h text:style-name="P2" text:outline-level="3"><text:soft-page-break/><text:span text:style-name="T1">💰 </text:span><text:span text:style-name="Strong_20_Emphasis"><text:span text:style-name="T1">ESTIMATED COSTS per semester</text:span></text:span><text:span text:style-name="T1">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TWD</text:p>
          </table:table-cell>
          <table:table-cell table:style-name="Table2.A1" office:value-type="string">
            <text:p text:style-name="P5">USD (≈ 1 USD = 32.5 TWD)</text:p>
          </table:table-cell>
          <table:table-cell table:style-name="Table2.A1" office:value-type="string">
            <text:p text:style-name="P5">VND (≈ 1 TWD = 770 VND)</text:p>
          </table:table-cell>
        </table:table-row>
        <table:table-row>
          <table:table-cell table:style-name="Table2.A1" office:value-type="string">
            <text:p text:style-name="P4">📘 Semiconductor Technical Academy</text:p>
          </table:table-cell>
          <table:table-cell table:style-name="Table2.A1" office:value-type="string">
            <text:p text:style-name="P4">53,200 TWD</text:p>
          </table:table-cell>
          <table:table-cell table:style-name="Table2.A1" office:value-type="string">
            <text:p text:style-name="P4">≈ 1,638 USD</text:p>
          </table:table-cell>
          <table:table-cell table:style-name="Table2.A1" office:value-type="string">
            <text:p text:style-name="P4">≈ 40,000,000 VND</text:p>
          </table:table-cell>
        </table:table-row>
        <table:table-row>
          <table:table-cell table:style-name="Table2.A1" office:value-type="string">
            <text:p text:style-name="P4">📘 Health &amp; Recreation Management</text:p>
          </table:table-cell>
          <table:table-cell table:style-name="Table2.A1" office:value-type="string">
            <text:p text:style-name="P4">46,570 TWD</text:p>
          </table:table-cell>
          <table:table-cell table:style-name="Table2.A1" office:value-type="string">
            <text:p text:style-name="P4">≈ 1,433 USD</text:p>
          </table:table-cell>
          <table:table-cell table:style-name="Table2.A1" office:value-type="string">
            <text:p text:style-name="P4">≈ 35,800,000 VND</text:p>
          </table:table-cell>
        </table:table-row>
        <table:table-row>
          <table:table-cell table:style-name="Table2.A1" office:value-type="string">
            <text:p text:style-name="P4">🏠 Dormitory (from semester 3)</text:p>
          </table:table-cell>
          <table:table-cell table:style-name="Table2.A1" office:value-type="string">
            <text:p text:style-name="P4">13,500 TWD</text:p>
          </table:table-cell>
          <table:table-cell table:style-name="Table2.A1" office:value-type="string">
            <text:p text:style-name="P4">≈ 415 USD</text:p>
          </table:table-cell>
          <table:table-cell table:style-name="Table2.A1" office:value-type="string">
            <text:p text:style-name="P4">≈ 10,400,000 VND</text:p>
          </table:table-cell>
        </table:table-row>
        <table:table-row>
          <table:table-cell table:style-name="Table2.A1" office:value-type="string">
            <text:p text:style-name="P4">🏥 Health Insurance (first 6 months)</text:p>
          </table:table-cell>
          <table:table-cell table:style-name="Table2.A1" office:value-type="string">
            <text:p text:style-name="P4">500 TWD/month</text:p>
          </table:table-cell>
          <table:table-cell table:style-name="Table2.A1" office:value-type="string">
            <text:p text:style-name="P4">≈ 15 USD</text:p>
          </table:table-cell>
          <table:table-cell table:style-name="Table2.A1" office:value-type="string">
            <text:p text:style-name="P4">≈ 385,000 VND</text:p>
          </table:table-cell>
        </table:table-row>
        <table:table-row>
          <table:table-cell table:style-name="Table2.A1" office:value-type="string">
            <text:p text:style-name="P4">🏥 Health Insurance (after month 6)</text:p>
          </table:table-cell>
          <table:table-cell table:style-name="Table2.A1" office:value-type="string">
            <text:p text:style-name="P4">826 TWD/month</text:p>
          </table:table-cell>
          <table:table-cell table:style-name="Table2.A1" office:value-type="string">
            <text:p text:style-name="P4">≈ 25 USD</text:p>
          </table:table-cell>
          <table:table-cell table:style-name="Table2.A1" office:value-type="string">
            <text:p text:style-name="P4">≈ 636,000 VND</text:p>
          </table:table-cell>
        </table:table-row>
        <table:table-row>
          <table:table-cell table:style-name="Table2.A1" office:value-type="string">
            <text:p text:style-name="P4">🪪 ARC (residence card)</text:p>
          </table:table-cell>
          <table:table-cell table:style-name="Table2.A1" office:value-type="string">
            <text:p text:style-name="P4">1,000 TWD/year</text:p>
          </table:table-cell>
          <table:table-cell table:style-name="Table2.A1" office:value-type="string">
            <text:p text:style-name="P4">≈ 31 USD</text:p>
          </table:table-cell>
          <table:table-cell table:style-name="Table2.A1" office:value-type="string">
            <text:p text:style-name="P4">≈ 770,000 VND</text:p>
          </table:table-cell>
        </table:table-row>
      </table:table>
      <text:p text:style-name="P3"><text:span text:style-name="Strong_20_Emphasis"><text:span text:style-name="T1">Note</text:span></text:span><text:span text:style-name="T1">: First semester </text:span><text:span text:style-name="Strong_20_Emphasis"><text:span text:style-name="T1">completely free</text:span></text:span><text:span text:style-name="T1"> of tuition and dormitory fees</text:span></text:p>
      <text:p text:style-name="Horizontal_20_Line"/>
      <text:h text:style-name="P2" text:outline-level="3"><text:span text:style-name="T1">⏰ </text:span><text:span text:style-name="Strong_20_Emphasis"><text:span text:style-name="T1">Working Hours &amp; Internship</text:span></text:span></text:h>
      <text:list text:style-name="L10">
        <text:list-item>
          <text:p text:style-name="P19"><text:span text:style-name="T1">Year 1: part-time job, </text:span><text:span text:style-name="Strong_20_Emphasis"><text:span text:style-name="T1">20 hours/week</text:span></text:span></text:p>
        </text:list-item>
        <text:list-item>
          <text:p text:style-name="P19"><text:span text:style-name="T1">Year 2–4: part-time job + internship, </text:span><text:span text:style-name="Strong_20_Emphasis"><text:span text:style-name="T1">40 hours/week</text:span></text:span></text:p>
        </text:list-item>
      </text:list>
      <text:p text:style-name="Horizontal_20_Line"/>
      <text:h text:style-name="P2" text:outline-level="3"><text:span text:style-name="T1">✅ </text:span><text:span text:style-name="Strong_20_Emphasis"><text:span text:style-name="T1">Requirements</text:span></text:span><text:span text:style-name="T1">:</text:span></text:h>
      <text:list text:style-name="L11">
        <text:list-item>
          <text:p text:style-name="P20"><text:span text:style-name="T1">Priority for applicants with </text:span><text:span text:style-name="Strong_20_Emphasis"><text:span text:style-name="T1">TOCFL A1 Chinese certificate</text:span></text:span></text:p>
        </text:list-item>
        <text:list-item>
          <text:p text:style-name="P20"><text:span text:style-name="T1">High school or vocational school diploma </text:span><text:span text:style-name="Strong_20_Emphasis"><text:span text:style-name="T1">recognized by Taiwan’s Ministry of Education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8T17:20:38.692000000</meta:creation-date>
    <dc:date>2026-06-28T17:21:38.020000000</dc:date>
    <meta:editing-duration>PT1M</meta:editing-duration>
    <meta:editing-cycles>1</meta:editing-cycles>
    <meta:document-statistic meta:table-count="2" meta:image-count="0" meta:object-count="1" meta:page-count="4" meta:paragraph-count="111" meta:word-count="648" meta:character-count="3040" meta:non-whitespace-character-count="2533"/>
    <meta:generator>LibreOffice/7.5.2.2$Windows_X86_64 LibreOffice_project/53bb9681a964705cf672590721dbc85eb4d0c3a2</meta:generator>
  </office:meta>
</office:document-meta>
</file>